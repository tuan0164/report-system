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9000000C7F4FB2D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1.1244in" draw:z-index="0"><draw:image xlink:href="Pictures/10000001000004C9000000C7F4FB2D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23:47:03.691386112</meta:creation-date>
    <dc:date>2026-07-01T23:47:40.061808482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6.2.4.2$Linux_X86_64 LibreOffice_project/620$Build-2</meta:generator>
  </office:meta>
</office:document-meta>
</file>